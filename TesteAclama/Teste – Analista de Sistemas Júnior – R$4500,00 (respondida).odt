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3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7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6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7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9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9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8.00pt" fo:font-weight="bold" fo:font-family="'Segoe UI Symbol'" style:font-family-asian="'Segoe UI Symbol'" style:font-family-complex="'Segoe UI Symbol'" fo:background-color="transparent" style:use-window-font-color="true"/>
    </style:style>
    <style:style style:name="T125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402.60pt"/>
          <style:tab-stop style:position="421118.95pt" style:type="righ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402.60pt"/>
          <style:tab-stop style:position="421118.95pt" style:type="right"/>
        </style:tab-stops>
      </style:paragraph-properties>
    </style:style>
    <style:style style:name="P5" style:family="paragraph">
      <style:paragraph-properties fo:line-height="100.00%" fo:text-align="left" fo:margin-top="10.00pt" fo:margin-bottom="6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00.00%" fo:text-align="left" fo:margin-top="7.00pt" fo:margin-bottom="6.00pt"/>
    </style:style>
    <text:list-style style:name="L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15.00%" fo:text-align="left" fo:margin-left="35.45pt" fo:text-indent="0.00pt" fo:margin-bottom="7.00pt"/>
    </style:style>
    <text:list-style style:name="L1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5.00%" fo:text-align="left" fo:margin-left="35.45pt" fo:text-indent="0.00pt" fo:margin-bottom="7.00pt"/>
    </style:style>
    <style:style style:name="P12" style:family="paragraph">
      <style:paragraph-properties fo:line-height="100.00%" fo:text-align="left" fo:margin-top="7.00pt" fo:margin-bottom="6.00pt"/>
    </style:style>
    <text:list-style style:name="L1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7.00pt"/>
    </style:style>
    <style:style style:name="P14" style:family="paragraph">
      <style:paragraph-properties fo:line-height="115.00%" fo:text-align="left" fo:margin-left="35.45pt" fo:text-indent="0.00pt" fo:margin-bottom="7.00pt"/>
    </style:style>
    <text:list-style style:name="L1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15.00%" fo:text-align="left" fo:margin-left="35.45pt" fo:text-indent="0.00pt" fo:margin-bottom="7.00pt"/>
    </style:style>
    <style:style style:name="P17" style:family="paragraph">
      <style:paragraph-properties fo:line-height="100.00%" fo:text-align="left" fo:margin-top="7.00pt" fo:margin-bottom="6.00pt"/>
    </style:style>
    <text:list-style style:name="L1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15.00%" fo:text-align="left" fo:margin-left="35.45pt" fo:text-indent="0.00pt" fo:margin-bottom="7.00pt"/>
    </style:style>
    <text:list-style style:name="L2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0" style:family="paragraph">
      <style:paragraph-properties fo:line-height="115.00%" fo:text-align="left" fo:margin-bottom="7.00pt"/>
    </style:style>
    <style:style style:name="P21" style:family="paragraph">
      <style:paragraph-properties fo:line-height="115.00%" fo:text-align="left" fo:margin-left="35.45pt" fo:text-indent="0.00pt" fo:margin-bottom="7.00pt"/>
    </style:style>
    <style:style style:name="P22" style:family="paragraph">
      <style:paragraph-properties fo:line-height="100.00%" fo:text-align="left" fo:margin-top="7.00pt" fo:margin-bottom="6.00pt"/>
    </style:style>
    <text:list-style style:name="L2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15.00%" fo:text-align="left" fo:margin-left="35.45pt" fo:text-indent="0.00pt" fo:margin-bottom="7.00pt"/>
    </style:style>
    <text:list-style style:name="L2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15.00%" fo:text-align="left" fo:margin-left="35.45pt" fo:text-indent="0.00pt" fo:margin-bottom="7.00pt"/>
    </style:style>
    <style:style style:name="P27" style:family="paragraph">
      <style:paragraph-properties fo:line-height="100.00%" fo:text-align="left" fo:margin-top="7.00pt" fo:margin-bottom="6.00pt"/>
    </style:style>
    <text:list-style style:name="L2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8" style:family="paragraph">
      <style:paragraph-properties fo:line-height="115.00%" fo:text-align="left" fo:margin-bottom="7.00pt"/>
    </style:style>
    <style:style style:name="P29" style:family="paragraph">
      <style:paragraph-properties fo:line-height="115.00%" fo:text-align="left" fo:margin-left="35.45pt" fo:text-indent="0.00pt" fo:margin-bottom="7.00pt"/>
    </style:style>
    <text:list-style style:name="L3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0" style:family="paragraph">
      <style:paragraph-properties fo:line-height="115.00%" fo:text-align="left" fo:margin-bottom="7.00pt"/>
    </style:style>
    <style:style style:name="P31" style:family="paragraph">
      <style:paragraph-properties fo:line-height="115.00%" fo:text-align="left" fo:margin-left="35.45pt" fo:text-indent="0.00pt" fo:margin-bottom="7.00pt"/>
    </style:style>
    <style:style style:name="P32" style:family="paragraph">
      <style:paragraph-properties fo:line-height="100.00%" fo:text-align="left" fo:margin-top="7.00pt" fo:margin-bottom="6.00pt"/>
    </style:style>
    <text:list-style style:name="L3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3" style:family="paragraph">
      <style:paragraph-properties fo:line-height="115.00%" fo:text-align="left" fo:margin-bottom="7.00pt"/>
    </style:style>
    <style:style style:name="P34" style:family="paragraph">
      <style:paragraph-properties fo:line-height="115.00%" fo:text-align="left" fo:margin-left="35.45pt" fo:text-indent="0.00pt" fo:margin-bottom="7.00pt"/>
    </style:style>
    <text:list-style style:name="L3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5" style:family="paragraph">
      <style:paragraph-properties fo:line-height="115.00%" fo:text-align="left" fo:margin-bottom="7.00pt"/>
    </style:style>
    <style:style style:name="P36" style:family="paragraph">
      <style:paragraph-properties fo:line-height="115.00%" fo:text-align="left" fo:margin-left="35.45pt" fo:text-indent="0.00pt" fo:margin-bottom="7.00pt"/>
    </style:style>
    <style:style style:name="P37" style:family="paragraph">
      <style:paragraph-properties fo:line-height="115.00%" fo:text-align="left" fo:margin-bottom="7.00pt"/>
    </style:style>
    <style:style style:name="P38" style:family="paragraph">
      <style:paragraph-properties fo:line-height="100.00%" fo:text-align="left" fo:margin-top="10.00pt" fo:margin-bottom="6.00pt"/>
    </style:style>
    <style:style style:name="P39" style:family="paragraph">
      <style:paragraph-properties fo:line-height="115.00%" fo:text-align="left" fo:margin-bottom="7.00pt"/>
    </style:style>
    <text:list-style style:name="L4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0" style:family="paragraph">
      <style:paragraph-properties fo:line-height="115.00%" fo:text-align="left" fo:margin-bottom="7.00pt"/>
    </style:style>
    <style:style style:name="P41" style:family="paragraph">
      <style:paragraph-properties fo:line-height="115.00%" fo:text-align="left" fo:margin-left="35.45pt" fo:text-indent="0.00pt" fo:margin-bottom="7.00pt"/>
    </style:style>
    <style:style style:name="P42" style:family="paragraph">
      <style:paragraph-properties fo:line-height="115.00%" fo:text-align="left" fo:margin-bottom="7.00pt"/>
    </style:style>
    <style:style style:name="P43" style:family="paragraph">
      <style:paragraph-properties fo:line-height="115.00%" fo:text-align="left" fo:margin-left="35.45pt" fo:text-indent="0.00pt" fo:margin-bottom="7.00pt"/>
    </style:style>
    <style:style style:name="P44" style:family="paragraph">
      <style:paragraph-properties fo:line-height="115.00%" fo:text-align="left" fo:margin-bottom="7.00pt"/>
    </style:style>
    <style:style style:name="P45" style:family="paragraph">
      <style:paragraph-properties fo:line-height="115.00%" fo:text-align="left" fo:margin-left="35.45pt" fo:text-indent="0.00pt" fo:margin-bottom="7.00pt"/>
    </style:style>
    <style:style style:name="P46" style:family="paragraph">
      <style:paragraph-properties fo:line-height="100.00%" fo:text-align="left"/>
    </style:style>
    <style:style style:name="TableColumn0100" style:family="table-column">
      <style:table-column-properties style:column-width="2.231250in"/>
    </style:style>
    <style:style style:name="TableColumn0101" style:family="table-column">
      <style:table-column-properties style:column-width="2.231250in"/>
    </style:style>
    <style:style style:name="TableColumn0102" style:family="table-column">
      <style:table-column-properties style:column-width="2.231250in"/>
    </style:style>
    <style:style style:name="Table01" style:family="table">
      <style:table-properties style:width="6.6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"><draw:frame text:anchor-type="as-char" svg:width="43.66mm" svg:height="22.49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>
            <text:p text:style-name="P3"><text:span text:style-name="T2">Teste<text:s/></text:span><text:span text:style-name="T3">–</text:span><text:span text:style-name="T4"><text:s/>Analista de Sistemas J</text:span><text:span text:style-name="T5">únior II</text:span></text:p>
            <text:p text:style-name="P3"><text:span text:style-name="T5">Nível Médio</text:span><text:span text:style-name="T6"/></text:p>
          </table:table-cell>
          <table:table-cell table:style-name="TableCell010002">
            <text:p text:style-name="P3"><text:span text:style-name="T7">HOME/PRESENCIAL</text:span><text:span text:style-name="T8"/></text:p>
          </table:table-cell>
        </table:table-row>
      </table:table>
      <text:p text:style-name="P5"><text:span text:style-name="T9">Teste<text:s/></text:span><text:span text:style-name="T10">–</text:span><text:span text:style-name="T11"><text:s/>Analista de Sistemas J</text:span><text:span text:style-name="T12">únior<text:s/></text:span><text:span text:style-name="T13">–</text:span><text:span text:style-name="T14"><text:s/>R$4500,00</text:span></text:p>
      <text:p text:style-name="P6"><text:span text:style-name="T15"><text:s text:c="9"/><text:tab/><text:tab/><text:tab/></text:span><text:span text:style-name="T16">Nível Médio</text:span></text:p>
      <text:p text:style-name="P7"><text:span text:style-name="T17">🔹 Parte 1<text:s/></text:span><text:span text:style-name="T18">–</text:span><text:span text:style-name="T19"><text:s/>Git e GitHub</text:span></text:p>
      <text:list text:style-name="L8">
        <text:list-item>
          <text:p text:style-name="P8"><text:span text:style-name="T20">Qual comando é usado para enviar alterações locais para um repositório remoto no GitHub? a)<text:s/></text:span><text:span text:style-name="T21">git push</text:span></text:p>
        </text:list-item>
      </text:list>
      <text:p text:style-name="P9"><text:span text:style-name="T22"><text:s/>b)<text:s/></text:span><text:span text:style-name="T23">git commit</text:span></text:p>
      <text:p text:style-name="P9"><text:span text:style-name="T24"><text:s/>c)<text:s/></text:span><text:span text:style-name="T25">git pull</text:span></text:p>
      <text:p text:style-name="P9"><text:span text:style-name="T26"><text:s/>d)<text:s/></text:span><text:span text:style-name="T27">git clone</text:span></text:p>
      <text:p text:style-name="P9"><text:span text:style-name="T27">Letra A, push</text:span></text:p>
      <text:list text:style-name="L10">
        <text:list-item>
          <text:p text:style-name="P10"><text:span text:style-name="T28">O que significa o comando<text:s/></text:span><text:span text:style-name="T29">git clone</text:span><text:span text:style-name="T30">?</text:span></text:p>
        </text:list-item>
      </text:list>
      <text:p text:style-name="P11"><text:span text:style-name="T31"/></text:p>
      <text:p text:style-name="P11"><text:span text:style-name="T32"><text:s/>a) Criar um novo branch</text:span></text:p>
      <text:p text:style-name="P11"><text:span text:style-name="T32"><text:s/>b) Copiar um repositório remoto para a máquina local</text:span></text:p>
      <text:p text:style-name="P11"><text:span text:style-name="T32"><text:s/>c) Atualizar o repositório remoto</text:span></text:p>
      <text:p text:style-name="P11"><text:span text:style-name="T32"><text:s/>d) Excluir um repositório</text:span></text:p>
      <text:p text:style-name="P11"><text:span text:style-name="T32">Letra B, copiar um repositório</text:span></text:p>
      <text:p text:style-name="P11"><text:span text:style-name="T33"/></text:p>
      <text:p text:style-name="P12"><text:span text:style-name="T34">🔹 Parte 2<text:s/></text:span><text:span text:style-name="T35">–</text:span><text:span text:style-name="T36"><text:s/>Node.js</text:span></text:p>
      <text:list text:style-name="L13">
        <text:list-item>
          <text:p text:style-name="P13"><text:span text:style-name="T37">Qual é a principal característica do Node.js?</text:span></text:p>
        </text:list-item>
      </text:list>
      <text:p text:style-name="P14"><text:span text:style-name="T37"><text:s/>a) É uma linguagem de programação </text:span></text:p>
      <text:p text:style-name="P14"><text:span text:style-name="T37">b) É um ambiente de execução JavaScript no servidor</text:span></text:p>
      <text:p text:style-name="P14"><text:span text:style-name="T37"><text:s/>c) É um framework para front-end</text:span></text:p>
      <text:p text:style-name="P14"><text:span text:style-name="T37"><text:s/>d) É um banco de dados relacional</text:span></text:p>
      <text:p text:style-name="P14"><text:span text:style-name="T37">Letra B, execução no servidor</text:span></text:p>
      <text:list text:style-name="L15">
        <text:list-item>
          <text:p text:style-name="P15"><text:span text:style-name="T37">Qual comando inicializa um projeto Node.js criando o arquivo<text:s/></text:span><text:span text:style-name="T38">package.json</text:span><text:span text:style-name="T39">?</text:span></text:p>
        </text:list-item>
      </text:list>
      <text:p text:style-name="P16"><text:span text:style-name="T39"><text:s/>a)<text:s/></text:span><text:span text:style-name="T40">npm install</text:span></text:p>
      <text:p text:style-name="P16"><text:span text:style-name="T41"><text:s/>b)<text:s/></text:span><text:span text:style-name="T42">npm init</text:span></text:p>
      <text:p text:style-name="P16"><text:span text:style-name="T43"><text:s/>c)<text:s/></text:span><text:span text:style-name="T44">node start</text:span></text:p>
      <text:p text:style-name="P16"><text:span text:style-name="T45"><text:s/>d)<text:s/></text:span><text:span text:style-name="T46">npm run</text:span></text:p>
      <text:p text:style-name="P16"><text:span text:style-name="T46">Letra B, npm init</text:span></text:p>
      <text:p text:style-name="P17"><text:span text:style-name="T47">🔹 Parte 3<text:s/></text:span><text:span text:style-name="T48">–</text:span><text:span text:style-name="T49"><text:s/>React.js</text:span></text:p>
      <text:list text:style-name="L18">
        <text:list-item>
          <text:p text:style-name="P18"><text:span text:style-name="T50">Em React, qual hook é usado para gerenciar estado em componentes funcionais?</text:span></text:p>
        </text:list-item>
      </text:list>
      <text:p text:style-name="P19"><text:span text:style-name="T50"><text:s/>a)<text:s/></text:span><text:span text:style-name="T51">useEffect</text:span></text:p>
      <text:p text:style-name="P19"><text:span text:style-name="T52"><text:s/>b)<text:s/></text:span><text:span text:style-name="T53">useState</text:span></text:p>
      <text:p text:style-name="P19"><text:span text:style-name="T54"><text:s/>c)<text:s/></text:span><text:span text:style-name="T55">useContext</text:span></text:p>
      <text:p text:style-name="P19"><text:span text:style-name="T56"><text:s/>d)<text:s/></text:span><text:span text:style-name="T57">useReducer</text:span></text:p>
      <text:p text:style-name="P19"><text:span text:style-name="T57">Letra B, useState</text:span></text:p>
      <text:list text:style-name="L20">
        <text:list-item>
          <text:p text:style-name="P20"><text:span text:style-name="T58">O que significa JSX no React?</text:span></text:p>
        </text:list-item>
      </text:list>
      <text:p text:style-name="P21"><text:span text:style-name="T58"><text:s/>a) Uma linguagem de estilização</text:span></text:p>
      <text:p text:style-name="P21"><text:span text:style-name="T58"><text:s/>b) Uma extensão de sintaxe que mistura HTML com JavaScript</text:span></text:p>
      <text:p text:style-name="P21"><text:span text:style-name="T58"><text:s/>c) Um banco de dados interno</text:span></text:p>
      <text:p text:style-name="P21"><text:span text:style-name="T58"><text:s/>d) Um compilador de código</text:span></text:p>
      <text:p text:style-name="P21"><text:span text:style-name="T58">Letra B, extensão de sintaxe</text:span></text:p>
      <text:p text:style-name="P22"><text:span text:style-name="T59">🔹 Parte 4<text:s/></text:span><text:span text:style-name="T60">–</text:span><text:span text:style-name="T61"><text:s/>Bulma.io e Bootstrap</text:span></text:p>
      <text:list text:style-name="L23">
        <text:list-item>
          <text:p text:style-name="P23"><text:span text:style-name="T62">Qual é a principal diferença entre Bulma e Bootstrap?</text:span></text:p>
        </text:list-item>
      </text:list>
      <text:p text:style-name="P24"><text:span text:style-name="T62"><text:s/>a) Bulma é baseado em Flexbox, Bootstrap usa Grid System</text:span></text:p>
      <text:p text:style-name="P24"><text:span text:style-name="T62"><text:s/>b) Bootstrap não suporta responsividade</text:span></text:p>
      <text:p text:style-name="P24"><text:span text:style-name="T62"><text:s/>c) Bulma não é open-source</text:span></text:p>
      <text:p text:style-name="P24"><text:span text:style-name="T62"><text:s/>d) Bootstrap não possui componentes prontos</text:span></text:p>
      <text:p text:style-name="P24"><text:span text:style-name="T62">Letra A</text:span></text:p>
      <text:list text:style-name="L25">
        <text:list-item>
          <text:p text:style-name="P25"><text:span text:style-name="T62">Qual classe do Bootstrap é usada para criar um botão estilizado?</text:span></text:p>
        </text:list-item>
      </text:list>
      <text:p text:style-name="P26"><text:span text:style-name="T62">a)<text:s/></text:span><text:span text:style-name="T63">.btn</text:span></text:p>
      <text:p text:style-name="P26"><text:span text:style-name="T64"><text:s/>b)<text:s/></text:span><text:span text:style-name="T65">.button</text:span></text:p>
      <text:p text:style-name="P26"><text:span text:style-name="T66"><text:s/>c)<text:s/></text:span><text:span text:style-name="T67">.click</text:span></text:p>
      <text:p text:style-name="P26"><text:span text:style-name="T68"><text:s/>d)<text:s/></text:span><text:span text:style-name="T69">.press</text:span></text:p>
      <text:p text:style-name="P26"><text:span text:style-name="T69">Letra A, btn</text:span></text:p>
      <text:p text:style-name="P27"><text:span text:style-name="T70">🔹 Parte 5<text:s/></text:span><text:span text:style-name="T71">–</text:span><text:span text:style-name="T72"><text:s/>HTML5 e CSS3</text:span></text:p>
      <text:list text:style-name="L28">
        <text:list-item>
          <text:p text:style-name="P28"><text:span text:style-name="T73">Qual tag HTML5 é usada para definir conteúdo semântico principal da página?</text:span></text:p>
        </text:list-item>
      </text:list>
      <text:p text:style-name="P29"><text:span text:style-name="T73"><text:s/>a)<text:s/></text:span><text:span text:style-name="T74">&lt;div&gt;</text:span></text:p>
      <text:p text:style-name="P29"><text:span text:style-name="T75"><text:s/>b)<text:s/></text:span><text:span text:style-name="T76">&lt;main&gt;</text:span></text:p>
      <text:p text:style-name="P29"><text:span text:style-name="T77"><text:s/>c)<text:s/></text:span><text:span text:style-name="T78">&lt;section&gt;</text:span><text:span text:style-name="T79"><text:s/></text:span></text:p>
      <text:p text:style-name="P29"><text:span text:style-name="T79">d)<text:s/></text:span><text:span text:style-name="T80">&lt;article&gt;</text:span></text:p>
      <text:p text:style-name="P29"><text:span text:style-name="T80">Letra B, &lt;main&gt;</text:span></text:p>
      <text:list text:style-name="L30">
        <text:list-item>
          <text:p text:style-name="P30"><text:span text:style-name="T81">Qual propriedade CSS3 é usada para criar animações de transição suave? </text:span></text:p>
        </text:list-item>
      </text:list>
      <text:p text:style-name="P31"><text:span text:style-name="T81">a)<text:s/></text:span><text:span text:style-name="T82">transition</text:span></text:p>
      <text:p text:style-name="P31"><text:span text:style-name="T83">b)<text:s/></text:span><text:span text:style-name="T84">animation</text:span></text:p>
      <text:p text:style-name="P31"><text:span text:style-name="T85"><text:s/>c)<text:s/></text:span><text:span text:style-name="T86">transform</text:span></text:p>
      <text:p text:style-name="P31"><text:span text:style-name="T87"><text:s/>d)<text:s/></text:span><text:span text:style-name="T88">hover</text:span></text:p>
      <text:p text:style-name="P31"><text:span text:style-name="T88">Letra A, transition</text:span></text:p>
      <text:p text:style-name="P32"><text:span text:style-name="T89">🔹 Parte 6<text:s/></text:span><text:span text:style-name="T90">–</text:span><text:span text:style-name="T91"><text:s/>PHP e Sistema de Login</text:span></text:p>
      <text:list text:style-name="L33">
        <text:list-item>
          <text:p text:style-name="P33"><text:span text:style-name="T92">Qual função PHP é usada para iniciar uma sessão?</text:span></text:p>
        </text:list-item>
      </text:list>
      <text:p text:style-name="P34"><text:span text:style-name="T92"><text:s/>a)<text:s/></text:span><text:span text:style-name="T93">session_start()</text:span></text:p>
      <text:p text:style-name="P34"><text:span text:style-name="T94"><text:s/>b)<text:s/></text:span><text:span text:style-name="T95">start_session()</text:span></text:p>
      <text:p text:style-name="P34"><text:span text:style-name="T96"><text:s/>c)<text:s/></text:span><text:span text:style-name="T97">begin_session()</text:span></text:p>
      <text:p text:style-name="P34"><text:span text:style-name="T98"><text:s/>d)<text:s/></text:span><text:span text:style-name="T99">open_session()</text:span></text:p>
      <text:p text:style-name="P34"><text:span text:style-name="T99">Letra A, session_start()</text:span></text:p>
      <text:list text:style-name="L35">
        <text:list-item>
          <text:p text:style-name="P35"><text:span text:style-name="T100">Em um sistema de login simples em PHP, qual seria a sequência correta de passos?</text:span></text:p>
        </text:list-item>
      </text:list>
      <text:p text:style-name="P36"><text:span text:style-name="T100"><text:s/>a) Capturar dados do formulário<text:s/></text:span><text:span text:style-name="T101">→ Validar usu</text:span><text:span text:style-name="T102">ário no banco<text:s/></text:span><text:span text:style-name="T103">→ Criar sess</text:span><text:span text:style-name="T104">ão<text:s/></text:span><text:span text:style-name="T105">→ Redirecionar para<text:s/></text:span><text:span text:style-name="T106">área restrita</text:span></text:p>
      <text:p text:style-name="P36"><text:span text:style-name="T107"><text:s/>b) Criar sessão<text:s/></text:span><text:span text:style-name="T108">→ Capturar dados → Validar usu</text:span><text:span text:style-name="T109">ário<text:s/></text:span><text:span text:style-name="T110">→ Redirecionar</text:span></text:p>
      <text:p text:style-name="P36"><text:span text:style-name="T111"><text:s/>c) Validar usuário<text:s/></text:span><text:span text:style-name="T112">→ Capturar dados → Criar sess</text:span><text:span text:style-name="T113">ão<text:s/></text:span><text:span text:style-name="T114">→ Redirecionar</text:span></text:p>
      <text:p text:style-name="P36"><text:span text:style-name="T115"><text:s/>d) Capturar dados<text:s/></text:span><text:span text:style-name="T116">→ Criar sess</text:span><text:span text:style-name="T117">ão<text:s/></text:span><text:span text:style-name="T118">→ Validar usu</text:span><text:span text:style-name="T119">ário<text:s/></text:span><text:span text:style-name="T120">→ Redirecionar</text:span></text:p>
      <text:p text:style-name="P37"><text:span text:style-name="T121"><text:tab/></text:span><text:span text:style-name="T122">Letra A</text:span><text:span text:style-name="T123"/></text:p>
      <text:p text:style-name="P38"><text:span text:style-name="T124">🔹 Desafio Pr</text:span><text:span text:style-name="T125">ático<text:s/></text:span><text:span text:style-name="T126">–</text:span><text:span text:style-name="T127"><text:s/>Sistema de Login</text:span></text:p>
      <text:p text:style-name="P39"><text:span text:style-name="T128">Objetivo:</text:span><text:span text:style-name="T129"><text:s/>Criar um sistema simples de login usando<text:s/></text:span><text:span text:style-name="T130">PHP, HTML5, CSS3</text:span><text:span text:style-name="T131"><text:s/>e estilização com<text:s/></text:span><text:span text:style-name="T132">Bootstrap ou Bulma</text:span><text:span text:style-name="T133">.</text:span></text:p>
      <text:p text:style-name="P39"><text:span text:style-name="T134">Requisitos:</text:span></text:p>
      <text:list text:style-name="L40">
        <text:list-item>
          <text:p text:style-name="P40"><text:span text:style-name="T135">Criar uma página<text:s/></text:span><text:span text:style-name="T136">login.php</text:span><text:span text:style-name="T137"><text:s/>com:</text:span></text:p>
        </text:list-item>
        <text:list-item>
          <text:p text:style-name="P41"><text:span text:style-name="T137">Formulário contendo campos de<text:s/></text:span><text:span text:style-name="T138">usuário</text:span><text:span text:style-name="T139"><text:s/>e<text:s/></text:span><text:span text:style-name="T140">senha</text:span><text:span text:style-name="T141">.</text:span></text:p>
        </text:list-item>
        <text:list-item>
          <text:p text:style-name="P41"><text:span text:style-name="T141">Botão de login estilizado com Bootstrap ou Bulma.</text:span></text:p>
        </text:list-item>
        <text:list-item>
          <text:p text:style-name="P42"><text:span text:style-name="T141">Criar um script PHP que:</text:span></text:p>
        </text:list-item>
        <text:list-item>
          <text:p text:style-name="P43"><text:span text:style-name="T141">Valide os dados enviados pelo formulário.</text:span></text:p>
        </text:list-item>
        <text:list-item>
          <text:p text:style-name="P43"><text:span text:style-name="T141">Compare com credenciais armazenadas em um banco de dados MySQL (ex.: tabela<text:s/></text:span><text:span text:style-name="T142">usuarios</text:span><text:span text:style-name="T143"><text:s/>com colunas<text:s/></text:span><text:span text:style-name="T144">id</text:span><text:span text:style-name="T145">,<text:s/></text:span><text:span text:style-name="T146">username</text:span><text:span text:style-name="T147">,<text:s/></text:span><text:span text:style-name="T148">password</text:span><text:span text:style-name="T149">).</text:span></text:p>
        </text:list-item>
        <text:list-item>
          <text:p text:style-name="P43"><text:span text:style-name="T149">Use<text:s/></text:span><text:span text:style-name="T150">session_start()</text:span><text:span text:style-name="T151"><text:s/>para iniciar a sessão do usuário autenticado.</text:span></text:p>
        </text:list-item>
        <text:list-item>
          <text:p text:style-name="P43"><text:span text:style-name="T151">Redirecione para uma página restrita (</text:span><text:span text:style-name="T152">dashboard.php</text:span><text:span text:style-name="T153">) se o login for bem-sucedido.</text:span></text:p>
        </text:list-item>
        <text:list-item>
          <text:p text:style-name="P43"><text:span text:style-name="T153">Exiba mensagem de erro se as credenciais forem inválidas.</text:span></text:p>
        </text:list-item>
        <text:list-item>
          <text:p text:style-name="P44"><text:span text:style-name="T153">Criar a página<text:s/></text:span><text:span text:style-name="T154">dashboard.php</text:span><text:span text:style-name="T155"><text:s/>que:</text:span></text:p>
        </text:list-item>
        <text:list-item>
          <text:p text:style-name="P45"><text:span text:style-name="T155">Mostre uma mensagem de boas-vindas com o nome do usuário logado.</text:span></text:p>
        </text:list-item>
        <text:list-item>
          <text:p text:style-name="P45"><text:span text:style-name="T155">Tenha um botão de<text:s/></text:span><text:span text:style-name="T156">logout</text:span><text:span text:style-name="T157"><text:s/>que destrua a sessão e volte para<text:s/></text:span><text:span text:style-name="T158">login.php</text:span><text:span text:style-name="T159">.</text:span></text:p>
        </text:list-item>
      </text:list>
      <text:p text:style-name="P46"><text:span text:style-name="T159">A entrega do teste será realizada no github.com<text:s/></text:span><text:a xlink:href="https://github.com/JesusGermanodaSilvaJunior1/testelogin-master"><text:span text:style-name="T160">https://github.com/JesusGermanodaSilvaJunior1/testelogin-master</text:span></text:a><text:span text:style-name="T161"><text:s text:c="2"/>de acordo com a sua branch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