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8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8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4.00pt" fo:font-weight="bold" fo:font-family="'Segoe UI Symbol'" style:font-family-asian="'Segoe UI Symbol'" style:font-family-complex="'Segoe UI Symbol'" fo:background-color="transparent" style:use-window-font-color="true"/>
    </style:style>
    <style:style style:name="T15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" style:family="text">
      <style:text-properties fo:font-size="14.00pt" fo:font-weight="bold" fo:font-family="'Segoe UI Symbol'" style:font-family-asian="'Segoe UI Symbol'" style:font-family-complex="'Segoe UI Symbol'" fo:background-color="transparent" style:use-window-font-color="true"/>
    </style:style>
    <style:style style:name="T33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34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45" style:family="text">
      <style:text-properties fo:font-size="14.00pt" fo:font-weight="bold" fo:font-family="'Segoe UI Symbol'" style:font-family-asian="'Segoe UI Symbol'" style:font-family-complex="'Segoe UI Symbol'" fo:background-color="transparent" style:use-window-font-color="true"/>
    </style:style>
    <style:style style:name="T46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47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4.00pt" fo:font-weight="bold" fo:font-family="'Segoe UI Symbol'" style:font-family-asian="'Segoe UI Symbol'" style:font-family-complex="'Segoe UI Symbol'" fo:background-color="transparent" style:use-window-font-color="true"/>
    </style:style>
    <style:style style:name="T58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59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68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69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70" style:family="text">
      <style:text-properties fo:font-size="14.00pt" fo:font-weight="bold" fo:font-family="'Segoe UI Symbol'" style:font-family-asian="'Segoe UI Symbol'" style:font-family-complex="'Segoe UI Symbol'" fo:background-color="transparent" style:use-window-font-color="true"/>
    </style:style>
    <style:style style:name="T71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72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4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6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8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0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2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4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6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8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89" style:family="text">
      <style:text-properties fo:font-size="14.00pt" fo:font-weight="bold" fo:font-family="'Segoe UI Symbol'" style:font-family-asian="'Segoe UI Symbol'" style:font-family-complex="'Segoe UI Symbol'" fo:background-color="transparent" style:use-window-font-color="true"/>
    </style:style>
    <style:style style:name="T90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9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3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5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7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9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1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1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3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5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8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0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2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5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7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9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2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4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6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8.00pt" fo:font-weight="bold" fo:font-family="'Segoe UI Symbol'" style:font-family-asian="'Segoe UI Symbol'" style:font-family-complex="'Segoe UI Symbol'" fo:background-color="transparent" style:use-window-font-color="true"/>
    </style:style>
    <style:style style:name="T130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131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0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1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6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1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8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1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0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1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2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1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4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1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6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1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8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1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2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1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justify" fo:margin-left="2.75pt" fo:text-indent="-2.75pt">
        <style:tab-stops>
          <style:tab-stop style:position="157.90pt"/>
          <style:tab-stop style:position="3402.55pt"/>
          <style:tab-stop style:position="421118.90pt" style:type="right"/>
        </style:tab-stops>
      </style:paragraph-properties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center"/>
    </style:style>
    <style:style style:name="P4" style:family="paragraph">
      <style:paragraph-properties fo:line-height="100.00%" fo:text-align="justify" fo:margin-left="2.75pt" fo:text-indent="-2.75pt">
        <style:tab-stops>
          <style:tab-stop style:position="157.90pt"/>
          <style:tab-stop style:position="3402.55pt"/>
          <style:tab-stop style:position="421118.90pt" style:type="right"/>
        </style:tab-stops>
      </style:paragraph-properties>
    </style:style>
    <style:style style:name="P5" style:family="paragraph">
      <style:paragraph-properties fo:line-height="100.00%" fo:text-align="left" fo:margin-top="10.00pt" fo:margin-bottom="6.00pt"/>
    </style:style>
    <style:style style:name="P6" style:family="paragraph">
      <style:paragraph-properties fo:line-height="115.00%" fo:text-align="left" fo:margin-bottom="7.00pt"/>
    </style:style>
    <style:style style:name="P7" style:family="paragraph">
      <style:paragraph-properties fo:line-height="100.00%" fo:text-align="left" fo:margin-top="7.00pt" fo:margin-bottom="6.00pt"/>
    </style:style>
    <text:list-style style:name="L8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8" style:family="paragraph">
      <style:paragraph-properties fo:line-height="115.00%" fo:text-align="left" fo:margin-bottom="7.00pt"/>
    </style:style>
    <style:style style:name="P9" style:family="paragraph">
      <style:paragraph-properties fo:line-height="115.00%" fo:text-align="left" fo:margin-left="35.45pt" fo:text-indent="0.00pt" fo:margin-bottom="7.00pt"/>
    </style:style>
    <text:list-style style:name="L10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10" style:family="paragraph">
      <style:paragraph-properties fo:line-height="115.00%" fo:text-align="left" fo:margin-bottom="7.00pt"/>
    </style:style>
    <style:style style:name="P11" style:family="paragraph">
      <style:paragraph-properties fo:line-height="115.00%" fo:text-align="left" fo:margin-left="35.45pt" fo:text-indent="0.00pt" fo:margin-bottom="7.00pt"/>
    </style:style>
    <style:style style:name="P12" style:family="paragraph">
      <style:paragraph-properties fo:line-height="100.00%" fo:text-align="left" fo:margin-top="7.00pt" fo:margin-bottom="6.00pt"/>
    </style:style>
    <text:list-style style:name="L13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13" style:family="paragraph">
      <style:paragraph-properties fo:line-height="115.00%" fo:text-align="left" fo:margin-bottom="7.00pt"/>
    </style:style>
    <style:style style:name="P14" style:family="paragraph">
      <style:paragraph-properties fo:line-height="115.00%" fo:text-align="left" fo:margin-left="35.45pt" fo:text-indent="0.00pt" fo:margin-bottom="7.00pt"/>
    </style:style>
    <text:list-style style:name="L15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15" style:family="paragraph">
      <style:paragraph-properties fo:line-height="115.00%" fo:text-align="left" fo:margin-bottom="7.00pt"/>
    </style:style>
    <style:style style:name="P16" style:family="paragraph">
      <style:paragraph-properties fo:line-height="115.00%" fo:text-align="left" fo:margin-left="35.45pt" fo:text-indent="0.00pt" fo:margin-bottom="7.00pt"/>
    </style:style>
    <style:style style:name="P17" style:family="paragraph">
      <style:paragraph-properties fo:line-height="100.00%" fo:text-align="left" fo:margin-top="7.00pt" fo:margin-bottom="6.00pt"/>
    </style:style>
    <text:list-style style:name="L18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18" style:family="paragraph">
      <style:paragraph-properties fo:line-height="115.00%" fo:text-align="left" fo:margin-bottom="7.00pt"/>
    </style:style>
    <style:style style:name="P19" style:family="paragraph">
      <style:paragraph-properties fo:line-height="115.00%" fo:text-align="left" fo:margin-left="35.45pt" fo:text-indent="0.00pt" fo:margin-bottom="7.00pt"/>
    </style:style>
    <text:list-style style:name="L20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20" style:family="paragraph">
      <style:paragraph-properties fo:line-height="115.00%" fo:text-align="left" fo:margin-bottom="7.00pt"/>
    </style:style>
    <style:style style:name="P21" style:family="paragraph">
      <style:paragraph-properties fo:line-height="115.00%" fo:text-align="left" fo:margin-left="35.45pt" fo:text-indent="0.00pt" fo:margin-bottom="7.00pt"/>
    </style:style>
    <style:style style:name="P22" style:family="paragraph">
      <style:paragraph-properties fo:line-height="100.00%" fo:text-align="left" fo:margin-top="7.00pt" fo:margin-bottom="6.00pt"/>
    </style:style>
    <text:list-style style:name="L23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23" style:family="paragraph">
      <style:paragraph-properties fo:line-height="115.00%" fo:text-align="left" fo:margin-bottom="7.00pt"/>
    </style:style>
    <style:style style:name="P24" style:family="paragraph">
      <style:paragraph-properties fo:line-height="115.00%" fo:text-align="left" fo:margin-left="35.45pt" fo:text-indent="0.00pt" fo:margin-bottom="7.00pt"/>
    </style:style>
    <text:list-style style:name="L25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25" style:family="paragraph">
      <style:paragraph-properties fo:line-height="115.00%" fo:text-align="left" fo:margin-bottom="7.00pt"/>
    </style:style>
    <style:style style:name="P26" style:family="paragraph">
      <style:paragraph-properties fo:line-height="115.00%" fo:text-align="left" fo:margin-left="35.45pt" fo:text-indent="0.00pt" fo:margin-bottom="7.00pt"/>
    </style:style>
    <style:style style:name="P27" style:family="paragraph">
      <style:paragraph-properties fo:line-height="115.00%" fo:text-align="left" fo:margin-left="35.45pt" fo:text-indent="0.00pt" fo:margin-bottom="7.00pt"/>
    </style:style>
    <style:style style:name="P28" style:family="paragraph">
      <style:paragraph-properties fo:line-height="115.00%" fo:text-align="left" fo:margin-left="35.45pt" fo:text-indent="0.00pt" fo:margin-bottom="7.00pt"/>
    </style:style>
    <style:style style:name="P29" style:family="paragraph">
      <style:paragraph-properties fo:line-height="100.00%" fo:text-align="left" fo:margin-top="7.00pt" fo:margin-bottom="6.00pt"/>
    </style:style>
    <text:list-style style:name="L30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30" style:family="paragraph">
      <style:paragraph-properties fo:line-height="115.00%" fo:text-align="left" fo:margin-bottom="7.00pt"/>
    </style:style>
    <style:style style:name="P31" style:family="paragraph">
      <style:paragraph-properties fo:line-height="115.00%" fo:text-align="left" fo:margin-left="35.45pt" fo:text-indent="0.00pt" fo:margin-bottom="7.00pt"/>
    </style:style>
    <text:list-style style:name="L32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32" style:family="paragraph">
      <style:paragraph-properties fo:line-height="115.00%" fo:text-align="left" fo:margin-bottom="7.00pt"/>
    </style:style>
    <style:style style:name="P33" style:family="paragraph">
      <style:paragraph-properties fo:line-height="115.00%" fo:text-align="left" fo:margin-left="35.45pt" fo:text-indent="0.00pt" fo:margin-bottom="7.00pt"/>
    </style:style>
    <style:style style:name="P34" style:family="paragraph">
      <style:paragraph-properties fo:line-height="100.00%" fo:text-align="left" fo:margin-top="7.00pt" fo:margin-bottom="6.00pt"/>
    </style:style>
    <text:list-style style:name="L35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35" style:family="paragraph">
      <style:paragraph-properties fo:line-height="115.00%" fo:text-align="left" fo:margin-bottom="7.00pt"/>
    </style:style>
    <style:style style:name="P36" style:family="paragraph">
      <style:paragraph-properties fo:line-height="115.00%" fo:text-align="left" fo:margin-left="35.45pt" fo:text-indent="0.00pt" fo:margin-bottom="7.00pt"/>
    </style:style>
    <text:list-style style:name="L37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37" style:family="paragraph">
      <style:paragraph-properties fo:line-height="115.00%" fo:text-align="left" fo:margin-bottom="7.00pt"/>
    </style:style>
    <style:style style:name="P38" style:family="paragraph">
      <style:paragraph-properties fo:line-height="115.00%" fo:text-align="left" fo:margin-left="35.45pt" fo:text-indent="0.00pt" fo:margin-bottom="7.00pt"/>
    </style:style>
    <style:style style:name="P39" style:family="paragraph">
      <style:paragraph-properties fo:line-height="115.00%" fo:text-align="left" fo:margin-bottom="7.00pt"/>
    </style:style>
    <style:style style:name="P40" style:family="paragraph">
      <style:paragraph-properties fo:line-height="100.00%" fo:text-align="left" fo:margin-top="10.00pt" fo:margin-bottom="6.00pt"/>
    </style:style>
    <style:style style:name="P41" style:family="paragraph">
      <style:paragraph-properties fo:line-height="115.00%" fo:text-align="left" fo:margin-bottom="7.00pt"/>
    </style:style>
    <text:list-style style:name="L42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42" style:family="paragraph">
      <style:paragraph-properties fo:line-height="115.00%" fo:text-align="left" fo:margin-bottom="7.00pt"/>
    </style:style>
    <style:style style:name="P43" style:family="paragraph">
      <style:paragraph-properties fo:line-height="115.00%" fo:text-align="left" fo:margin-left="35.45pt" fo:text-indent="0.00pt" fo:margin-bottom="7.00pt"/>
    </style:style>
    <style:style style:name="P44" style:family="paragraph">
      <style:paragraph-properties fo:line-height="115.00%" fo:text-align="left" fo:margin-bottom="7.00pt"/>
    </style:style>
    <style:style style:name="P45" style:family="paragraph">
      <style:paragraph-properties fo:line-height="115.00%" fo:text-align="left" fo:margin-left="35.45pt" fo:text-indent="0.00pt" fo:margin-bottom="7.00pt"/>
    </style:style>
    <style:style style:name="P46" style:family="paragraph">
      <style:paragraph-properties fo:line-height="115.00%" fo:text-align="left" fo:margin-bottom="7.00pt"/>
    </style:style>
    <style:style style:name="P47" style:family="paragraph">
      <style:paragraph-properties fo:line-height="115.00%" fo:text-align="left" fo:margin-left="35.45pt" fo:text-indent="0.00pt" fo:margin-bottom="7.00pt"/>
    </style:style>
    <style:style style:name="P48" style:family="paragraph">
      <style:paragraph-properties fo:line-height="100.00%" fo:text-align="left"/>
    </style:style>
    <style:style style:name="TableColumn0100" style:family="table-column">
      <style:table-column-properties style:column-width="2.231250in"/>
    </style:style>
    <style:style style:name="TableColumn0101" style:family="table-column">
      <style:table-column-properties style:column-width="2.231250in"/>
    </style:style>
    <style:style style:name="TableColumn0102" style:family="table-column">
      <style:table-column-properties style:column-width="2.231250in"/>
    </style:style>
    <style:style style:name="Table01" style:family="table">
      <style:table-properties style:width="6.693750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6944in solid #000000" fo:border-left="0.006944in solid #000000" fo:border-right="0.000694in solid #000000" fo:border-bottom="0.006944in solid #000000" fo:padding-left="0.038194in" fo:padding-right="0.038194in" fo:vertical-align="top" fo:background-color="#ffffff"/>
    </style:style>
    <style:style style:name="TableCell010001" style:family="table-cell">
      <style:table-cell-properties fo:border-top="0.006944in solid #000000" fo:border-left="0.006944in solid #000000" fo:border-right="0.000694in solid #000000" fo:border-bottom="0.006944in solid #000000" fo:padding-left="0.038194in" fo:padding-right="0.038194in" fo:vertical-align="center" fo:background-color="#ffffff"/>
    </style:style>
    <style:style style:name="TableCell010002" style:family="table-cell">
      <style:table-cell-properties fo:border-top="0.006944in solid #000000" fo:border-left="0.006944in solid #000000" fo:border-right="0.006944in solid #000000" fo:border-bottom="0.006944in solid #000000" fo:padding-left="0.038194in" fo:padding-right="0.038194in" fo:vertical-align="center" fo:background-color="#ffffff"/>
    </style:style>
  </office:automatic-styles>
  <office:body>
    <office:text>
      <table:table table:style-name="Table01">
        <table:table-column table:style-name="TableColumn0100"/>
        <table:table-column table:style-name="TableColumn0101"/>
        <table:table-column table:style-name="TableColumn0102"/>
        <table:table-row table:style-name="TableRow0100">
          <table:table-cell table:style-name="TableCell010000">
            <text:p text:style-name="P2"><draw:frame text:anchor-type="as-char" svg:width="43.66mm" svg:height="22.49mm" style:rel-width="scale" style:rel-height="scale"><draw:object-ole xlink:href="OleObj1"/><draw:image xlink:href="ObjectReplacements/OleObj1"/></draw:frame><text:span text:style-name="T1"/></text:p>
          </table:table-cell>
          <table:table-cell table:style-name="TableCell010001">
            <text:p text:style-name="P3"><text:span text:style-name="T2">Teste<text:s/></text:span><text:span text:style-name="T3">– Analista de Sistemas J</text:span><text:span text:style-name="T4">únior II</text:span></text:p>
            <text:p text:style-name="P3"><text:span text:style-name="T4">Nível Médio</text:span><text:span text:style-name="T5"/></text:p>
          </table:table-cell>
          <table:table-cell table:style-name="TableCell010002">
            <text:p text:style-name="P3"><text:span text:style-name="T6">HOME/PRESENCIAL</text:span><text:span text:style-name="T7"/></text:p>
          </table:table-cell>
        </table:table-row>
      </table:table>
      <text:p text:style-name="P5"><text:span text:style-name="T8">Teste<text:s/></text:span><text:span text:style-name="T9">– Analista de Sistemas J</text:span><text:span text:style-name="T10">únior<text:s/></text:span><text:span text:style-name="T11">– R$4500,00</text:span></text:p>
      <text:p text:style-name="P6"><text:span text:style-name="T12"><text:s text:c="9"/><text:tab/><text:tab/><text:tab/></text:span><text:span text:style-name="T13">Nível Médio</text:span></text:p>
      <text:p text:style-name="P7"><text:span text:style-name="T14">🔹</text:span><text:span text:style-name="T15"><text:s/>Parte 1<text:s/></text:span><text:span text:style-name="T16">– Git e GitHub</text:span></text:p>
      <text:list text:style-name="L8">
        <text:list-item>
          <text:p text:style-name="P8"><text:span text:style-name="T17">Qual comando é usado para enviar alterações locais para um repositório remoto no GitHub?<text:s/></text:span><text:span text:style-name="T18"/></text:p>
        </text:list-item>
        <text:list-item>
          <text:p text:style-name="P8"><text:span text:style-name="T19">a)<text:s/></text:span><text:span text:style-name="T20">git push</text:span></text:p>
        </text:list-item>
      </text:list>
      <text:p text:style-name="P9"><text:span text:style-name="T21"><text:s/>b)<text:s/></text:span><text:span text:style-name="T22">git commit</text:span></text:p>
      <text:p text:style-name="P9"><text:span text:style-name="T23"><text:s/>c)<text:s/></text:span><text:span text:style-name="T24">git pull</text:span></text:p>
      <text:p text:style-name="P9"><text:span text:style-name="T25"><text:s/>d)<text:s/></text:span><text:span text:style-name="T26">git clone</text:span></text:p>
      <text:p text:style-name="P9"><text:span text:style-name="T26"/></text:p>
      <text:p text:style-name="P9"><text:span text:style-name="T26">resposta letra A </text:span></text:p>
      <text:list text:style-name="L10">
        <text:list-item>
          <text:p text:style-name="P10"><text:span text:style-name="T27">O que significa o comando<text:s/></text:span><text:span text:style-name="T28">git clone</text:span><text:span text:style-name="T29">?</text:span></text:p>
        </text:list-item>
      </text:list>
      <text:p text:style-name="P11"><text:span text:style-name="T30"/></text:p>
      <text:p text:style-name="P11"><text:span text:style-name="T31"><text:s/>a) Criar um novo branch</text:span></text:p>
      <text:p text:style-name="P11"><text:span text:style-name="T31"><text:s/>b) Copiar um repositório remoto para a máquina local</text:span></text:p>
      <text:p text:style-name="P11"><text:span text:style-name="T31"><text:s/>c) Atualizar o repositório remoto</text:span></text:p>
      <text:p text:style-name="P11"><text:span text:style-name="T31"><text:s/>d) Excluir um repositório</text:span></text:p>
      <text:p text:style-name="P11"><text:span text:style-name="T31"/></text:p>
      <text:p text:style-name="P11"><text:span text:style-name="T31">resposta letra B.</text:span></text:p>
      <text:p text:style-name="P12"><text:span text:style-name="T32">🔹</text:span><text:span text:style-name="T33"><text:s/>Parte 2<text:s/></text:span><text:span text:style-name="T34">– Node.js</text:span></text:p>
      <text:list text:style-name="L13">
        <text:list-item>
          <text:p text:style-name="P13"><text:span text:style-name="T35">Qual é a principal característica do Node.js?</text:span></text:p>
        </text:list-item>
      </text:list>
      <text:p text:style-name="P14"><text:span text:style-name="T35"><text:s/>a) É uma linguagem de programação </text:span></text:p>
      <text:p text:style-name="P14"><text:span text:style-name="T35">b) É um ambiente de execução JavaScript no servidor</text:span></text:p>
      <text:p text:style-name="P14"><text:span text:style-name="T35"><text:s/>c) É um framework para front-end</text:span></text:p>
      <text:p text:style-name="P14"><text:span text:style-name="T35"><text:s/>d) É um banco de dados relacional</text:span></text:p>
      <text:p text:style-name="P14"><text:span text:style-name="T35">resposta letra B</text:span></text:p>
      <text:p text:style-name="P14"><text:span text:style-name="T35"/></text:p>
      <text:list text:style-name="L15">
        <text:list-item>
          <text:p text:style-name="P15"><text:span text:style-name="T35">Qual comando inicializa um projeto Node.js criando o arquivo<text:s/></text:span><text:span text:style-name="T36">package.json</text:span><text:span text:style-name="T37">?</text:span></text:p>
        </text:list-item>
      </text:list>
      <text:p text:style-name="P16"><text:span text:style-name="T37"><text:s/>a)<text:s/></text:span><text:span text:style-name="T38">npm install</text:span></text:p>
      <text:p text:style-name="P16"><text:span text:style-name="T39"><text:s/>b)<text:s/></text:span><text:span text:style-name="T40">npm init</text:span></text:p>
      <text:p text:style-name="P16"><text:span text:style-name="T41"><text:s/>c)<text:s/></text:span><text:span text:style-name="T42">node start</text:span></text:p>
      <text:p text:style-name="P16"><text:span text:style-name="T43"><text:s/>d)<text:s/></text:span><text:span text:style-name="T44">npm run</text:span></text:p>
      <text:p text:style-name="P16"><text:span text:style-name="T44">Resposta letra B.</text:span></text:p>
      <text:p text:style-name="P16"><text:span text:style-name="T44"/></text:p>
      <text:p text:style-name="P17"><text:span text:style-name="T45">🔹</text:span><text:span text:style-name="T46"><text:s/>Parte 3<text:s/></text:span><text:span text:style-name="T47">– React.js</text:span></text:p>
      <text:list text:style-name="L18">
        <text:list-item>
          <text:p text:style-name="P18"><text:span text:style-name="T48">Em React, qual hook é usado para gerenciar estado em componentes funcionais?</text:span></text:p>
        </text:list-item>
      </text:list>
      <text:p text:style-name="P19"><text:span text:style-name="T48"><text:s/>a)<text:s/></text:span><text:span text:style-name="T49">useEffect</text:span></text:p>
      <text:p text:style-name="P19"><text:span text:style-name="T50"><text:s/>b)<text:s/></text:span><text:span text:style-name="T51">useState</text:span></text:p>
      <text:p text:style-name="P19"><text:span text:style-name="T52"><text:s/>c)<text:s/></text:span><text:span text:style-name="T53">useContext</text:span></text:p>
      <text:p text:style-name="P19"><text:span text:style-name="T54"><text:s/>d)<text:s/></text:span><text:span text:style-name="T55">useReducer</text:span></text:p>
      <text:p text:style-name="P19"><text:span text:style-name="T55">Resposta letra B.</text:span></text:p>
      <text:p text:style-name="P19"><text:span text:style-name="T55"/></text:p>
      <text:list text:style-name="L20">
        <text:list-item>
          <text:p text:style-name="P20"><text:span text:style-name="T56">O que significa JSX no React?</text:span></text:p>
        </text:list-item>
      </text:list>
      <text:p text:style-name="P21"><text:span text:style-name="T56"><text:s/>a) Uma linguagem de estilização</text:span></text:p>
      <text:p text:style-name="P21"><text:span text:style-name="T56"><text:s/>b) Uma extensão de sintaxe que mistura HTML com JavaScript</text:span></text:p>
      <text:p text:style-name="P21"><text:span text:style-name="T56"><text:s/>c) Um banco de dados interno</text:span></text:p>
      <text:p text:style-name="P21"><text:span text:style-name="T56"><text:s/>d) Um compilador de código</text:span></text:p>
      <text:p text:style-name="P21"><text:span text:style-name="T56">Resposta letra B</text:span></text:p>
      <text:p text:style-name="P21"><text:span text:style-name="T56"/></text:p>
      <text:p text:style-name="P22"><text:span text:style-name="T57">🔹</text:span><text:span text:style-name="T58"><text:s/>Parte 4<text:s/></text:span><text:span text:style-name="T59">– Bulma.io e Bootstrap</text:span></text:p>
      <text:list text:style-name="L23">
        <text:list-item>
          <text:p text:style-name="P23"><text:span text:style-name="T60">Qual é a principal diferença entre Bulma e Bootstrap?</text:span></text:p>
        </text:list-item>
      </text:list>
      <text:p text:style-name="P24"><text:span text:style-name="T60"><text:s/>a) Bulma é baseado em Flexbox, Bootstrap usa Grid System</text:span></text:p>
      <text:p text:style-name="P24"><text:span text:style-name="T60"><text:s/>b) Bootstrap não suporta responsividade</text:span></text:p>
      <text:p text:style-name="P24"><text:span text:style-name="T60"><text:s/>c) Bulma não é open-source</text:span></text:p>
      <text:p text:style-name="P24"><text:span text:style-name="T60"><text:s/>d) Bootstrap não possui componentes prontos</text:span></text:p>
      <text:p text:style-name="P24"><text:span text:style-name="T60"/></text:p>
      <text:p text:style-name="P24"><text:span text:style-name="T60">Resposta letra A.</text:span></text:p>
      <text:list text:style-name="L25">
        <text:list-item>
          <text:p text:style-name="P25"><text:span text:style-name="T60">Qual classe do Bootstrap é usada para criar um botão estilizado?</text:span></text:p>
        </text:list-item>
      </text:list>
      <text:p text:style-name="P26"><text:span text:style-name="T60">a)<text:s/></text:span><text:span text:style-name="T61">.btn</text:span></text:p>
      <text:p text:style-name="P26"><text:span text:style-name="T62"><text:s/>b)<text:s/></text:span><text:span text:style-name="T63">.button</text:span></text:p>
      <text:p text:style-name="P26"><text:span text:style-name="T64"><text:s/>c)<text:s/></text:span><text:span text:style-name="T65">.click</text:span></text:p>
      <text:p text:style-name="P26"><text:span text:style-name="T66"><text:s/>d)<text:s/></text:span><text:span text:style-name="T67">.press</text:span></text:p>
      <text:p text:style-name="P26"><text:span text:style-name="T67"/></text:p>
      <text:p text:style-name="P27"><text:span text:style-name="T68">Resposta letra A</text:span></text:p>
      <text:p text:style-name="P28"><text:span text:style-name="T69"/></text:p>
      <text:p text:style-name="P29"><text:span text:style-name="T70">🔹</text:span><text:span text:style-name="T71"><text:s/>Parte 5<text:s/></text:span><text:span text:style-name="T72">– HTML5 e CSS3</text:span></text:p>
      <text:list text:style-name="L30">
        <text:list-item>
          <text:p text:style-name="P30"><text:span text:style-name="T73">Qual tag HTML5 é usada para definir conteúdo semântico principal da página?</text:span></text:p>
        </text:list-item>
      </text:list>
      <text:p text:style-name="P31"><text:span text:style-name="T73"><text:s/>a)<text:s/></text:span><text:span text:style-name="T74">&lt;div&gt;</text:span></text:p>
      <text:p text:style-name="P31"><text:span text:style-name="T75"><text:s/>b)<text:s/></text:span><text:span text:style-name="T76">&lt;main&gt;</text:span></text:p>
      <text:p text:style-name="P31"><text:span text:style-name="T77"><text:s/>c)<text:s/></text:span><text:span text:style-name="T78">&lt;section&gt;</text:span><text:span text:style-name="T79"><text:s/></text:span></text:p>
      <text:p text:style-name="P31"><text:span text:style-name="T79">d)<text:s/></text:span><text:span text:style-name="T80">&lt;article&gt;</text:span></text:p>
      <text:p text:style-name="P31"><text:span text:style-name="T80"/></text:p>
      <text:p text:style-name="P31"><text:span text:style-name="T80">Resposta letra B.</text:span></text:p>
      <text:list text:style-name="L32">
        <text:list-item>
          <text:p text:style-name="P32"><text:span text:style-name="T81">Qual propriedade CSS3 é usada para criar animações de transição suave? </text:span></text:p>
        </text:list-item>
      </text:list>
      <text:p text:style-name="P33"><text:span text:style-name="T81">a)<text:s/></text:span><text:span text:style-name="T82">transition</text:span></text:p>
      <text:p text:style-name="P33"><text:span text:style-name="T83">b)<text:s/></text:span><text:span text:style-name="T84">animation</text:span></text:p>
      <text:p text:style-name="P33"><text:span text:style-name="T85"><text:s/>c)<text:s/></text:span><text:span text:style-name="T86">transform</text:span></text:p>
      <text:p text:style-name="P33"><text:span text:style-name="T87"><text:s/>d)<text:s/></text:span><text:span text:style-name="T88">hover</text:span></text:p>
      <text:p text:style-name="P33"><text:span text:style-name="T88"/></text:p>
      <text:p text:style-name="P33"><text:span text:style-name="T88">Resposta letra A.</text:span></text:p>
      <text:p text:style-name="P33"><text:span text:style-name="T88"/></text:p>
      <text:p text:style-name="P34"><text:span text:style-name="T89">🔹</text:span><text:span text:style-name="T90"><text:s/>Parte 6<text:s/></text:span><text:span text:style-name="T91">– PHP e Sistema de Login</text:span></text:p>
      <text:list text:style-name="L35">
        <text:list-item>
          <text:p text:style-name="P35"><text:span text:style-name="T92">Qual função PHP é usada para iniciar uma sessão?</text:span></text:p>
        </text:list-item>
      </text:list>
      <text:p text:style-name="P36"><text:span text:style-name="T92"><text:s/>a)<text:s/></text:span><text:span text:style-name="T93">session_start()</text:span></text:p>
      <text:p text:style-name="P36"><text:span text:style-name="T94"><text:s/>b)<text:s/></text:span><text:span text:style-name="T95">start_session()</text:span></text:p>
      <text:p text:style-name="P36"><text:span text:style-name="T96"><text:s/>c)<text:s/></text:span><text:span text:style-name="T97">begin_session()</text:span></text:p>
      <text:p text:style-name="P36"><text:span text:style-name="T98"><text:s/>d)<text:s/></text:span><text:span text:style-name="T99">open_session()</text:span></text:p>
      <text:p text:style-name="P36"><text:span text:style-name="T99"/></text:p>
      <text:p text:style-name="P36"><text:span text:style-name="T99">Resposta letra A.</text:span></text:p>
      <text:p text:style-name="P36"><text:span text:style-name="T99"/></text:p>
      <text:list text:style-name="L37">
        <text:list-item>
          <text:p text:style-name="P37"><text:span text:style-name="T100">Em um sistema de login simples em PHP, qual seria a sequência correta de passos?</text:span></text:p>
        </text:list-item>
      </text:list>
      <text:p text:style-name="P38"><text:span text:style-name="T100"><text:s/>a) Capturar dados do formulário<text:s/></text:span><text:span text:style-name="T101">→</text:span><text:span text:style-name="T102"><text:s/>Validar usuário no banco<text:s/></text:span><text:span text:style-name="T103">→</text:span><text:span text:style-name="T104"><text:s/>Criar sessão<text:s/></text:span><text:span text:style-name="T105">→</text:span><text:span text:style-name="T106"><text:s/>Redirecionar para área restrita</text:span></text:p>
      <text:p text:style-name="P38"><text:span text:style-name="T107"><text:s/>b) Criar sessão<text:s/></text:span><text:span text:style-name="T108">→</text:span><text:span text:style-name="T109"><text:s/>Capturar dados<text:s/></text:span><text:span text:style-name="T110">→</text:span><text:span text:style-name="T111"><text:s/>Validar usuário<text:s/></text:span><text:span text:style-name="T112">→</text:span><text:span text:style-name="T113"><text:s/>Redirecionar</text:span></text:p>
      <text:p text:style-name="P38"><text:span text:style-name="T114"><text:s/>c) Validar usuário<text:s/></text:span><text:span text:style-name="T115">→</text:span><text:span text:style-name="T116"><text:s/>Capturar dados<text:s/></text:span><text:span text:style-name="T117">→</text:span><text:span text:style-name="T118"><text:s/>Criar sessão<text:s/></text:span><text:span text:style-name="T119">→</text:span><text:span text:style-name="T120"><text:s/>Redirecionar</text:span></text:p>
      <text:p text:style-name="P38"><text:span text:style-name="T121"><text:s/>d) Capturar dados<text:s/></text:span><text:span text:style-name="T122">→</text:span><text:span text:style-name="T123"><text:s/>Criar sessão<text:s/></text:span><text:span text:style-name="T124">→</text:span><text:span text:style-name="T125"><text:s/>Validar usuário<text:s/></text:span><text:span text:style-name="T126">→</text:span><text:span text:style-name="T127"><text:s/>Redirecionar</text:span></text:p>
      <text:p text:style-name="P39"><text:span text:style-name="T128"/></text:p>
      <text:p text:style-name="P39"><text:span text:style-name="T128">Resposta letra A.</text:span></text:p>
      <text:p text:style-name="P39"><text:span text:style-name="T128"/></text:p>
      <text:p text:style-name="P40"><text:span text:style-name="T129">🔹</text:span><text:span text:style-name="T130"><text:s/>Desafio Prático<text:s/></text:span><text:span text:style-name="T131">– Sistema de Login</text:span></text:p>
      <text:p text:style-name="P41"><text:span text:style-name="T132">Objetivo:</text:span><text:span text:style-name="T133"><text:s/>Criar um sistema simples de login usando<text:s/></text:span><text:span text:style-name="T134">PHP, HTML5, CSS3</text:span><text:span text:style-name="T135"><text:s/>e estilização com<text:s/></text:span><text:span text:style-name="T136">Bootstrap ou Bulma</text:span><text:span text:style-name="T137">.</text:span></text:p>
      <text:p text:style-name="P41"><text:span text:style-name="T138">Requisitos:</text:span></text:p>
      <text:list text:style-name="L42">
        <text:list-item>
          <text:p text:style-name="P42"><text:span text:style-name="T139">Criar uma página<text:s/></text:span><text:span text:style-name="T140">login.php</text:span><text:span text:style-name="T141"><text:s/>com:</text:span></text:p>
        </text:list-item>
        <text:list-item>
          <text:p text:style-name="P43"><text:span text:style-name="T141">Formulário contendo campos de<text:s/></text:span><text:span text:style-name="T142">usuário</text:span><text:span text:style-name="T143"><text:s/>e<text:s/></text:span><text:span text:style-name="T144">senha</text:span><text:span text:style-name="T145">.</text:span></text:p>
        </text:list-item>
        <text:list-item>
          <text:p text:style-name="P43"><text:span text:style-name="T145">Botão de login estilizado com Bootstrap ou Bulma.</text:span></text:p>
        </text:list-item>
        <text:list-item>
          <text:p text:style-name="P44"><text:span text:style-name="T145">Criar um script PHP que:</text:span></text:p>
        </text:list-item>
        <text:list-item>
          <text:p text:style-name="P45"><text:span text:style-name="T145">Valide os dados enviados pelo formulário.</text:span></text:p>
        </text:list-item>
        <text:list-item>
          <text:p text:style-name="P45"><text:span text:style-name="T145">Compare com credenciais armazenadas em um banco de dados MySQL (ex.: tabela<text:s/></text:span><text:span text:style-name="T146">usuarios</text:span><text:span text:style-name="T147"><text:s/>com colunas<text:s/></text:span><text:span text:style-name="T148">id</text:span><text:span text:style-name="T149">,<text:s/></text:span><text:span text:style-name="T150">username</text:span><text:span text:style-name="T151">,<text:s/></text:span><text:span text:style-name="T152">password</text:span><text:span text:style-name="T153">).</text:span></text:p>
        </text:list-item>
        <text:list-item>
          <text:p text:style-name="P45"><text:span text:style-name="T153">Use<text:s/></text:span><text:span text:style-name="T154">session_start()</text:span><text:span text:style-name="T155"><text:s/>para iniciar a sessão do usuário autenticado.</text:span></text:p>
        </text:list-item>
        <text:list-item>
          <text:p text:style-name="P45"><text:span text:style-name="T155">Redirecione para uma página restrita (</text:span><text:span text:style-name="T156">dashboard.php</text:span><text:span text:style-name="T157">) se o login for bem-sucedido.</text:span></text:p>
        </text:list-item>
        <text:list-item>
          <text:p text:style-name="P45"><text:span text:style-name="T157">Exiba mensagem de erro se as credenciais forem inválidas.</text:span></text:p>
        </text:list-item>
        <text:list-item>
          <text:p text:style-name="P46"><text:span text:style-name="T157">Criar a página<text:s/></text:span><text:span text:style-name="T158">dashboard.php</text:span><text:span text:style-name="T159"><text:s/>que:</text:span></text:p>
        </text:list-item>
        <text:list-item>
          <text:p text:style-name="P47"><text:span text:style-name="T159">Mostre uma mensagem de boas-vindas com o nome do usuário logado.</text:span></text:p>
        </text:list-item>
        <text:list-item>
          <text:p text:style-name="P47"><text:span text:style-name="T159">Tenha um botão de<text:s/></text:span><text:span text:style-name="T160">logout</text:span><text:span text:style-name="T161"><text:s/>que destrua a sessão e volte para<text:s/></text:span><text:span text:style-name="T162">login.php</text:span><text:span text:style-name="T163">.</text:span></text:p>
        </text:list-item>
      </text:list>
      <text:p text:style-name="P48"><text:span text:style-name="T163">A entrega do teste será realizada no github.com<text:s/></text:span><text:a xlink:href="https://github.com/JesusGermanodaSilvaJunior1/testelogin-master"><text:span text:style-name="T164">https://github.com/JesusGermanodaSilvaJunior1/testelogin-master</text:span></text:a><text:span text:style-name="T165"><text:s text:c="2"/>de acordo com a sua branch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