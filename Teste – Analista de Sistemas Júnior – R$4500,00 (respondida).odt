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5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81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8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01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10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0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13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8.00pt" fo:font-weight="bold" fo:font-family="'Segoe UI Symbol'" style:font-family-asian="'Segoe UI Symbol'" style:font-family-complex="'Segoe UI Symbol'" fo:background-color="transparent" style:use-window-font-color="true"/>
    </style:style>
    <style:style style:name="T13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402.60pt"/>
          <style:tab-stop style:position="421118.95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402.60pt"/>
          <style:tab-stop style:position="421118.95pt" style:type="right"/>
        </style:tab-stops>
      </style:paragraph-properties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 fo:margin-top="7.00pt" fo:margin-bottom="6.00pt"/>
    </style:style>
    <text:list-style style:name="L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left" fo:margin-left="35.45pt" fo:text-indent="0.00pt" fo:margin-bottom="7.00pt"/>
    </style:style>
    <text:list-style style:name="L1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 fo:margin-left="35.45pt" fo:text-indent="0.00pt" fo:margin-bottom="7.00pt"/>
    </style:style>
    <style:style style:name="P12" style:family="paragraph">
      <style:paragraph-properties fo:line-height="100.00%" fo:text-align="left" fo:margin-top="7.00pt" fo:margin-bottom="6.00pt"/>
    </style:style>
    <text:list-style style:name="L1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15.00%" fo:text-align="left" fo:margin-left="35.45pt" fo:text-indent="0.00pt" fo:margin-bottom="7.00pt"/>
    </style:style>
    <text:list-style style:name="L1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15.00%" fo:text-align="left" fo:margin-left="35.45pt" fo:text-indent="0.00pt" fo:margin-bottom="7.00pt"/>
    </style:style>
    <style:style style:name="P17" style:family="paragraph">
      <style:paragraph-properties fo:line-height="100.00%" fo:text-align="left" fo:margin-top="7.00pt" fo:margin-bottom="6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15.00%" fo:text-align="left" fo:margin-left="35.45pt" fo:text-indent="0.00pt" fo:margin-bottom="7.00pt"/>
    </style:style>
    <text:list-style style:name="L2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15.00%" fo:text-align="left" fo:margin-left="35.45pt" fo:text-indent="0.00pt" fo:margin-bottom="7.00pt"/>
    </style:style>
    <style:style style:name="P22" style:family="paragraph">
      <style:paragraph-properties fo:line-height="100.00%" fo:text-align="left" fo:margin-top="7.00pt" fo:margin-bottom="6.00pt"/>
    </style:style>
    <text:list-style style:name="L2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15.00%" fo:text-align="left" fo:margin-left="35.45pt" fo:text-indent="0.00pt" fo:margin-bottom="7.00pt"/>
    </style:style>
    <text:list-style style:name="L2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left="35.45pt" fo:text-indent="0.00pt" fo:margin-bottom="7.00pt"/>
    </style:style>
    <style:style style:name="P27" style:family="paragraph">
      <style:paragraph-properties fo:line-height="100.00%" fo:text-align="left" fo:margin-top="7.00pt" fo:margin-bottom="6.00pt"/>
    </style:style>
    <text:list-style style:name="L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8" style:family="paragraph">
      <style:paragraph-properties fo:line-height="115.00%" fo:text-align="left" fo:margin-bottom="7.00pt"/>
    </style:style>
    <style:style style:name="P29" style:family="paragraph">
      <style:paragraph-properties fo:line-height="115.00%" fo:text-align="left" fo:margin-left="35.45pt" fo:text-indent="0.00pt" fo:margin-bottom="7.00pt"/>
    </style:style>
    <text:list-style style:name="L3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0" style:family="paragraph">
      <style:paragraph-properties fo:line-height="115.00%" fo:text-align="left" fo:margin-bottom="7.00pt"/>
    </style:style>
    <style:style style:name="P31" style:family="paragraph">
      <style:paragraph-properties fo:line-height="115.00%" fo:text-align="left" fo:margin-left="35.45pt" fo:text-indent="0.00pt" fo:margin-bottom="7.00pt"/>
    </style:style>
    <style:style style:name="P32" style:family="paragraph">
      <style:paragraph-properties fo:line-height="100.00%" fo:text-align="left" fo:margin-top="7.00pt" fo:margin-bottom="6.00pt"/>
    </style:style>
    <text:list-style style:name="L3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15.00%" fo:text-align="left" fo:margin-left="35.45pt" fo:text-indent="0.00pt" fo:margin-bottom="7.00pt"/>
    </style:style>
    <text:list-style style:name="L3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15.00%" fo:text-align="left" fo:margin-left="35.45pt" fo:text-indent="0.00pt" fo:margin-bottom="7.00pt"/>
    </style:style>
    <style:style style:name="P37" style:family="paragraph">
      <style:paragraph-properties fo:line-height="115.00%" fo:text-align="left" fo:margin-bottom="7.00pt"/>
    </style:style>
    <style:style style:name="P38" style:family="paragraph">
      <style:paragraph-properties fo:line-height="100.00%" fo:text-align="left" fo:margin-top="10.00pt" fo:margin-bottom="6.00pt"/>
    </style:style>
    <style:style style:name="P39" style:family="paragraph">
      <style:paragraph-properties fo:line-height="115.00%" fo:text-align="left" fo:margin-bottom="7.00pt"/>
    </style:style>
    <text:list-style style:name="L4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0" style:family="paragraph">
      <style:paragraph-properties fo:line-height="115.00%" fo:text-align="left" fo:margin-bottom="7.00pt"/>
    </style:style>
    <style:style style:name="P41" style:family="paragraph">
      <style:paragraph-properties fo:line-height="115.00%" fo:text-align="left" fo:margin-left="35.45pt" fo:text-indent="0.00pt" fo:margin-bottom="7.00pt"/>
    </style:style>
    <style:style style:name="P42" style:family="paragraph">
      <style:paragraph-properties fo:line-height="115.00%" fo:text-align="left" fo:margin-bottom="7.00pt"/>
    </style:style>
    <style:style style:name="P43" style:family="paragraph">
      <style:paragraph-properties fo:line-height="115.00%" fo:text-align="left" fo:margin-left="35.45pt" fo:text-indent="0.00pt" fo:margin-bottom="7.00pt"/>
    </style:style>
    <style:style style:name="P44" style:family="paragraph">
      <style:paragraph-properties fo:line-height="115.00%" fo:text-align="left" fo:margin-bottom="7.00pt"/>
    </style:style>
    <style:style style:name="P45" style:family="paragraph">
      <style:paragraph-properties fo:line-height="115.00%" fo:text-align="left" fo:margin-left="35.45pt" fo:text-indent="0.00pt" fo:margin-bottom="7.00pt"/>
    </style:style>
    <style:style style:name="P46" style:family="paragraph">
      <style:paragraph-properties fo:line-height="100.00%" fo:text-align="left"/>
    </style:style>
    <style:style style:name="TableColumn0100" style:family="table-column">
      <style:table-column-properties style:column-width="2.231250in"/>
    </style:style>
    <style:style style:name="TableColumn0101" style:family="table-column">
      <style:table-column-properties style:column-width="2.231250in"/>
    </style:style>
    <style:style style:name="TableColumn0102" style:family="table-column">
      <style:table-column-properties style:column-width="2.231250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draw:frame text:anchor-type="as-char" svg:width="43.66mm" svg:height="22.49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Teste<text:s/></text:span><text:span text:style-name="T3">–</text:span><text:span text:style-name="T4"><text:s/>Analista de Sistemas J</text:span><text:span text:style-name="T5">únior II</text:span></text:p>
            <text:p text:style-name="P3"><text:span text:style-name="T5">Nível Médio</text:span><text:span text:style-name="T6"/></text:p>
          </table:table-cell>
          <table:table-cell table:style-name="TableCell010002">
            <text:p text:style-name="P3"><text:span text:style-name="T7">HOME/PRESENCIAL</text:span><text:span text:style-name="T8"/></text:p>
          </table:table-cell>
        </table:table-row>
      </table:table>
      <text:p text:style-name="P5"><text:span text:style-name="T9">Teste<text:s/></text:span><text:span text:style-name="T10">–</text:span><text:span text:style-name="T11"><text:s/>Analista de Sistemas J</text:span><text:span text:style-name="T12">únior<text:s/></text:span><text:span text:style-name="T13">–</text:span><text:span text:style-name="T14"><text:s/>R$4500,00</text:span></text:p>
      <text:p text:style-name="P6"><text:span text:style-name="T15"><text:s text:c="9"/><text:tab/><text:tab/><text:tab/></text:span><text:span text:style-name="T16">Nível Médio</text:span></text:p>
      <text:p text:style-name="P7"><text:span text:style-name="T17">🔹</text:span><text:span text:style-name="T18"><text:s/>Parte 1<text:s/></text:span><text:span text:style-name="T19">–</text:span><text:span text:style-name="T20"><text:s/>Git e GitHub</text:span></text:p>
      <text:list text:style-name="L8">
        <text:list-item>
          <text:p text:style-name="P8"><text:span text:style-name="T21">Qual comando é usado para enviar alterações locais para um repositório remoto no GitHub? a)<text:s/></text:span><text:span text:style-name="T22">git push</text:span></text:p>
        </text:list-item>
      </text:list>
      <text:p text:style-name="P9"><text:span text:style-name="T23"><text:s/>b)<text:s/></text:span><text:span text:style-name="T24">git commit</text:span></text:p>
      <text:p text:style-name="P9"><text:span text:style-name="T25"><text:s/>c)<text:s/></text:span><text:span text:style-name="T26">git pull</text:span></text:p>
      <text:p text:style-name="P9"><text:span text:style-name="T27"><text:s/>d)<text:s/></text:span><text:span text:style-name="T28">git clone</text:span></text:p>
      <text:p text:style-name="P9"><text:span text:style-name="T29">Letra A, push</text:span></text:p>
      <text:list text:style-name="L10">
        <text:list-item>
          <text:p text:style-name="P10"><text:span text:style-name="T30">O que significa o comando<text:s/></text:span><text:span text:style-name="T31">git clone</text:span><text:span text:style-name="T32">?</text:span></text:p>
        </text:list-item>
      </text:list>
      <text:p text:style-name="P11"><text:span text:style-name="T33"/></text:p>
      <text:p text:style-name="P11"><text:span text:style-name="T34"><text:s/>a) Criar um novo branch</text:span></text:p>
      <text:p text:style-name="P11"><text:span text:style-name="T34"><text:s/>b) Copiar um repositório remoto para a máquina local</text:span></text:p>
      <text:p text:style-name="P11"><text:span text:style-name="T34"><text:s/>c) Atualizar o repositório remoto</text:span></text:p>
      <text:p text:style-name="P11"><text:span text:style-name="T34"><text:s/>d) Excluir um repositório</text:span></text:p>
      <text:p text:style-name="P11"><text:span text:style-name="T35">Letra B, copiar um repositório</text:span></text:p>
      <text:p text:style-name="P11"><text:span text:style-name="T36"/></text:p>
      <text:p text:style-name="P12"><text:span text:style-name="T37">🔹 Parte 2<text:s/></text:span><text:span text:style-name="T38">–</text:span><text:span text:style-name="T39"><text:s/>Node.js</text:span></text:p>
      <text:list text:style-name="L13">
        <text:list-item>
          <text:p text:style-name="P13"><text:span text:style-name="T40">Qual é a principal característica do Node.js?</text:span></text:p>
        </text:list-item>
      </text:list>
      <text:p text:style-name="P14"><text:span text:style-name="T40"><text:s/>a) É uma linguagem de programação </text:span></text:p>
      <text:p text:style-name="P14"><text:span text:style-name="T40">b) É um ambiente de execução JavaScript no servidor</text:span></text:p>
      <text:p text:style-name="P14"><text:span text:style-name="T40"><text:s/>c) É um framework para front-end</text:span></text:p>
      <text:p text:style-name="P14"><text:span text:style-name="T40"><text:s/>d) É um banco de dados relacional</text:span></text:p>
      <text:p text:style-name="P14"><text:span text:style-name="T41">Letra B, execução no servidor</text:span></text:p>
      <text:list text:style-name="L15">
        <text:list-item>
          <text:p text:style-name="P15"><text:span text:style-name="T42">Qual comando inicializa um projeto Node.js criando o arquivo<text:s/></text:span><text:span text:style-name="T43">package.json</text:span><text:span text:style-name="T44">?</text:span></text:p>
        </text:list-item>
      </text:list>
      <text:p text:style-name="P16"><text:span text:style-name="T44"><text:s/>a)<text:s/></text:span><text:span text:style-name="T45">npm install</text:span></text:p>
      <text:p text:style-name="P16"><text:span text:style-name="T46"><text:s/>b)<text:s/></text:span><text:span text:style-name="T47">npm init</text:span></text:p>
      <text:p text:style-name="P16"><text:span text:style-name="T48"><text:s/>c)<text:s/></text:span><text:span text:style-name="T49">node start</text:span></text:p>
      <text:p text:style-name="P16"><text:span text:style-name="T50"><text:s/>d)<text:s/></text:span><text:span text:style-name="T51">npm run</text:span></text:p>
      <text:p text:style-name="P16"><text:span text:style-name="T52">Letra B, npm init</text:span></text:p>
      <text:p text:style-name="P17"><text:span text:style-name="T53">🔹 Parte 3<text:s/></text:span><text:span text:style-name="T54">–</text:span><text:span text:style-name="T55"><text:s/>React.js</text:span></text:p>
      <text:list text:style-name="L18">
        <text:list-item>
          <text:p text:style-name="P18"><text:span text:style-name="T56">Em React, qual hook é usado para gerenciar estado em componentes funcionais?</text:span></text:p>
        </text:list-item>
      </text:list>
      <text:p text:style-name="P19"><text:span text:style-name="T56"><text:s/>a)<text:s/></text:span><text:span text:style-name="T57">useEffect</text:span></text:p>
      <text:p text:style-name="P19"><text:span text:style-name="T58"><text:s/>b)<text:s/></text:span><text:span text:style-name="T59">useState</text:span></text:p>
      <text:p text:style-name="P19"><text:span text:style-name="T60"><text:s/>c)<text:s/></text:span><text:span text:style-name="T61">useContext</text:span></text:p>
      <text:p text:style-name="P19"><text:span text:style-name="T62"><text:s/>d)<text:s/></text:span><text:span text:style-name="T63">useReducer</text:span></text:p>
      <text:p text:style-name="P19"><text:span text:style-name="T64">Letra B, useState</text:span></text:p>
      <text:list text:style-name="L20">
        <text:list-item>
          <text:p text:style-name="P20"><text:span text:style-name="T65">O que significa JSX no React?</text:span></text:p>
        </text:list-item>
      </text:list>
      <text:p text:style-name="P21"><text:span text:style-name="T65"><text:s/>a) Uma linguagem de estilização</text:span></text:p>
      <text:p text:style-name="P21"><text:span text:style-name="T65"><text:s/>b) Uma extensão de sintaxe que mistura HTML com JavaScript</text:span></text:p>
      <text:p text:style-name="P21"><text:span text:style-name="T65"><text:s/>c) Um banco de dados interno</text:span></text:p>
      <text:p text:style-name="P21"><text:span text:style-name="T65"><text:s/>d) Um compilador de código</text:span></text:p>
      <text:p text:style-name="P21"><text:span text:style-name="T66">Letra B, extensão de sintaxe</text:span></text:p>
      <text:p text:style-name="P22"><text:span text:style-name="T67">🔹 Parte 4<text:s/></text:span><text:span text:style-name="T68">–</text:span><text:span text:style-name="T69"><text:s/>Bulma.io e Bootstrap</text:span></text:p>
      <text:list text:style-name="L23">
        <text:list-item>
          <text:p text:style-name="P23"><text:span text:style-name="T70">Qual é a principal diferença entre Bulma e Bootstrap?</text:span></text:p>
        </text:list-item>
      </text:list>
      <text:p text:style-name="P24"><text:span text:style-name="T70"><text:s/>a) Bulma é baseado em Flexbox, Bootstrap usa Grid System</text:span></text:p>
      <text:p text:style-name="P24"><text:span text:style-name="T70"><text:s/>b) Bootstrap não suporta responsividade</text:span></text:p>
      <text:p text:style-name="P24"><text:span text:style-name="T70"><text:s/>c) Bulma não é open-source</text:span></text:p>
      <text:p text:style-name="P24"><text:span text:style-name="T70"><text:s/>d) Bootstrap não possui componentes prontos</text:span></text:p>
      <text:p text:style-name="P24"><text:span text:style-name="T71">Letra A</text:span></text:p>
      <text:list text:style-name="L25">
        <text:list-item>
          <text:p text:style-name="P25"><text:span text:style-name="T72">Qual classe do Bootstrap é usada para criar um botão estilizado?</text:span></text:p>
        </text:list-item>
      </text:list>
      <text:p text:style-name="P26"><text:span text:style-name="T72">a)<text:s/></text:span><text:span text:style-name="T73">.btn</text:span></text:p>
      <text:p text:style-name="P26"><text:span text:style-name="T74"><text:s/>b)<text:s/></text:span><text:span text:style-name="T75">.button</text:span></text:p>
      <text:p text:style-name="P26"><text:span text:style-name="T76"><text:s/>c)<text:s/></text:span><text:span text:style-name="T77">.click</text:span></text:p>
      <text:p text:style-name="P26"><text:span text:style-name="T78"><text:s/>d)<text:s/></text:span><text:span text:style-name="T79">.press</text:span></text:p>
      <text:p text:style-name="P26"><text:span text:style-name="T80">Letra A, btn</text:span></text:p>
      <text:p text:style-name="P27"><text:span text:style-name="T81">🔹 Parte 5<text:s/></text:span><text:span text:style-name="T82">–</text:span><text:span text:style-name="T83"><text:s/>HTML5 e CSS3</text:span></text:p>
      <text:list text:style-name="L28">
        <text:list-item>
          <text:p text:style-name="P28"><text:span text:style-name="T84">Qual tag HTML5 é usada para definir conteúdo semântico principal da página?</text:span></text:p>
        </text:list-item>
      </text:list>
      <text:p text:style-name="P29"><text:span text:style-name="T84"><text:s/>a)<text:s/></text:span><text:span text:style-name="T85">&lt;div&gt;</text:span></text:p>
      <text:p text:style-name="P29"><text:span text:style-name="T86"><text:s/>b)<text:s/></text:span><text:span text:style-name="T87">&lt;main&gt;</text:span></text:p>
      <text:p text:style-name="P29"><text:span text:style-name="T88"><text:s/>c)<text:s/></text:span><text:span text:style-name="T89">&lt;section&gt;</text:span><text:span text:style-name="T90"><text:s/></text:span></text:p>
      <text:p text:style-name="P29"><text:span text:style-name="T90">d)<text:s/></text:span><text:span text:style-name="T91">&lt;article&gt;</text:span></text:p>
      <text:p text:style-name="P29"><text:span text:style-name="T92">Letra B, &lt;main&gt;</text:span></text:p>
      <text:list text:style-name="L30">
        <text:list-item>
          <text:p text:style-name="P30"><text:span text:style-name="T93">Qual propriedade CSS3 é usada para criar animações de transição suave? </text:span></text:p>
        </text:list-item>
      </text:list>
      <text:p text:style-name="P31"><text:span text:style-name="T93">a)<text:s/></text:span><text:span text:style-name="T94">transition</text:span></text:p>
      <text:p text:style-name="P31"><text:span text:style-name="T95">b)<text:s/></text:span><text:span text:style-name="T96">animation</text:span></text:p>
      <text:p text:style-name="P31"><text:span text:style-name="T97"><text:s/>c)<text:s/></text:span><text:span text:style-name="T98">transform</text:span></text:p>
      <text:p text:style-name="P31"><text:span text:style-name="T99"><text:s/>d)<text:s/></text:span><text:span text:style-name="T100">hover</text:span></text:p>
      <text:p text:style-name="P31"><text:span text:style-name="T101">Letra A, transition</text:span></text:p>
      <text:p text:style-name="P32"><text:span text:style-name="T102">🔹 Parte 6<text:s/></text:span><text:span text:style-name="T103">–</text:span><text:span text:style-name="T104"><text:s/>PHP e Sistema de Login</text:span></text:p>
      <text:list text:style-name="L33">
        <text:list-item>
          <text:p text:style-name="P33"><text:span text:style-name="T105">Qual função PHP é usada para iniciar uma sessão?</text:span></text:p>
        </text:list-item>
      </text:list>
      <text:p text:style-name="P34"><text:span text:style-name="T105"><text:s/>a)<text:s/></text:span><text:span text:style-name="T106">session_start()</text:span></text:p>
      <text:p text:style-name="P34"><text:span text:style-name="T107"><text:s/>b)<text:s/></text:span><text:span text:style-name="T108">start_session()</text:span></text:p>
      <text:p text:style-name="P34"><text:span text:style-name="T109"><text:s/>c)<text:s/></text:span><text:span text:style-name="T110">begin_session()</text:span></text:p>
      <text:p text:style-name="P34"><text:span text:style-name="T111"><text:s/>d)<text:s/></text:span><text:span text:style-name="T112">open_session()</text:span></text:p>
      <text:p text:style-name="P34"><text:span text:style-name="T113">Letra A, session_start()</text:span></text:p>
      <text:list text:style-name="L35">
        <text:list-item>
          <text:p text:style-name="P35"><text:span text:style-name="T114">Em um sistema de login simples em PHP, qual seria a sequência correta de passos?</text:span></text:p>
        </text:list-item>
      </text:list>
      <text:p text:style-name="P36"><text:span text:style-name="T114"><text:s/>a) Capturar dados do formulário<text:s/></text:span><text:span text:style-name="T115">→</text:span><text:span text:style-name="T116"><text:s/>Validar usu</text:span><text:span text:style-name="T117">ário no banco<text:s/></text:span><text:span text:style-name="T118">→ Criar sess</text:span><text:span text:style-name="T119">ão<text:s/></text:span><text:span text:style-name="T120">→ Redirecionar para<text:s/></text:span><text:span text:style-name="T121">área restrita</text:span></text:p>
      <text:p text:style-name="P36"><text:span text:style-name="T122"><text:s/>b) Criar sessão<text:s/></text:span><text:span text:style-name="T123">→ Capturar dados → Validar usu</text:span><text:span text:style-name="T124">ário<text:s/></text:span><text:span text:style-name="T125">→ Redirecionar</text:span></text:p>
      <text:p text:style-name="P36"><text:span text:style-name="T126"><text:s/>c) Validar usuário<text:s/></text:span><text:span text:style-name="T127">→ Capturar dados → Criar sess</text:span><text:span text:style-name="T128">ão<text:s/></text:span><text:span text:style-name="T129">→ Redirecionar</text:span></text:p>
      <text:p text:style-name="P36"><text:span text:style-name="T130"><text:s/>d) Capturar dados<text:s/></text:span><text:span text:style-name="T131">→ Criar sess</text:span><text:span text:style-name="T132">ão<text:s/></text:span><text:span text:style-name="T133">→ Validar usu</text:span><text:span text:style-name="T134">ário<text:s/></text:span><text:span text:style-name="T135">→ Redirecionar</text:span></text:p>
      <text:p text:style-name="P37"><text:span text:style-name="T136"><text:tab/></text:span><text:span text:style-name="T137">Letra A</text:span></text:p>
      <text:p text:style-name="P38"><text:span text:style-name="T138">🔹 Desafio Pr</text:span><text:span text:style-name="T139">ático<text:s/></text:span><text:span text:style-name="T140">–</text:span><text:span text:style-name="T141"><text:s/>Sistema de Login</text:span></text:p>
      <text:p text:style-name="P39"><text:span text:style-name="T142">Objetivo:</text:span><text:span text:style-name="T143"><text:s/>Criar um sistema simples de login usando<text:s/></text:span><text:span text:style-name="T144">PHP, HTML5, CSS3</text:span><text:span text:style-name="T145"><text:s/>e estilização com<text:s/></text:span><text:span text:style-name="T146">Bootstrap ou Bulma</text:span><text:span text:style-name="T147">.</text:span></text:p>
      <text:p text:style-name="P39"><text:span text:style-name="T148">Requisitos:</text:span></text:p>
      <text:list text:style-name="L40">
        <text:list-item>
          <text:p text:style-name="P40"><text:span text:style-name="T149">Criar uma página<text:s/></text:span><text:span text:style-name="T150">login.php</text:span><text:span text:style-name="T151"><text:s/>com:</text:span></text:p>
        </text:list-item>
        <text:list-item>
          <text:p text:style-name="P41"><text:span text:style-name="T151">Formulário contendo campos de<text:s/></text:span><text:span text:style-name="T152">usuário</text:span><text:span text:style-name="T153"><text:s/>e<text:s/></text:span><text:span text:style-name="T154">senha</text:span><text:span text:style-name="T155">.</text:span></text:p>
        </text:list-item>
        <text:list-item>
          <text:p text:style-name="P41"><text:span text:style-name="T155">Botão de login estilizado com Bootstrap ou Bulma.</text:span></text:p>
        </text:list-item>
        <text:list-item>
          <text:p text:style-name="P42"><text:span text:style-name="T155">Criar um script PHP que:</text:span></text:p>
        </text:list-item>
        <text:list-item>
          <text:p text:style-name="P43"><text:span text:style-name="T155">Valide os dados enviados pelo formulário.</text:span></text:p>
        </text:list-item>
        <text:list-item>
          <text:p text:style-name="P43"><text:span text:style-name="T155">Compare com credenciais armazenadas em um banco de dados MySQL (ex.: tabela<text:s/></text:span><text:span text:style-name="T156">usuarios</text:span><text:span text:style-name="T157"><text:s/>com colunas<text:s/></text:span><text:span text:style-name="T158">id</text:span><text:span text:style-name="T159">,<text:s/></text:span><text:span text:style-name="T160">username</text:span><text:span text:style-name="T161">,<text:s/></text:span><text:span text:style-name="T162">password</text:span><text:span text:style-name="T163">).</text:span></text:p>
        </text:list-item>
        <text:list-item>
          <text:p text:style-name="P43"><text:span text:style-name="T163">Use<text:s/></text:span><text:span text:style-name="T164">session_start()</text:span><text:span text:style-name="T165"><text:s/>para iniciar a sessão do usuário autenticado.</text:span></text:p>
        </text:list-item>
        <text:list-item>
          <text:p text:style-name="P43"><text:span text:style-name="T165">Redirecione para uma página restrita (</text:span><text:span text:style-name="T166">dashboard.php</text:span><text:span text:style-name="T167">) se o login for bem-sucedido.</text:span></text:p>
        </text:list-item>
        <text:list-item>
          <text:p text:style-name="P43"><text:span text:style-name="T167">Exiba mensagem de erro se as credenciais forem inválidas.</text:span></text:p>
        </text:list-item>
        <text:list-item>
          <text:p text:style-name="P44"><text:span text:style-name="T167">Criar a página<text:s/></text:span><text:span text:style-name="T168">dashboard.php</text:span><text:span text:style-name="T169"><text:s/>que:</text:span></text:p>
        </text:list-item>
        <text:list-item>
          <text:p text:style-name="P45"><text:span text:style-name="T169">Mostre uma mensagem de boas-vindas com o nome do usuário logado.</text:span></text:p>
        </text:list-item>
        <text:list-item>
          <text:p text:style-name="P45"><text:span text:style-name="T169">Tenha um botão de<text:s/></text:span><text:span text:style-name="T170">logout</text:span><text:span text:style-name="T171"><text:s/>que destrua a sessão e volte para<text:s/></text:span><text:span text:style-name="T172">login.php</text:span><text:span text:style-name="T173">.</text:span></text:p>
        </text:list-item>
      </text:list>
      <text:p text:style-name="P46"><text:span text:style-name="T173">A entrega do teste será realizada no github.com<text:s/></text:span><text:a xlink:href="https://github.com/JesusGermanodaSilvaJunior1/testelogin-master"><text:span text:style-name="T174">https://github.com/JesusGermanodaSilvaJunior1/testelogin-master</text:span></text:a><text:span text:style-name="T175"><text:s text:c="2"/>de acordo com a sua branch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